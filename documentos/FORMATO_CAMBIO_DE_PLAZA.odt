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 fo:line-height="107%"/>
      <style:text-properties style:font-name="Times New Roman" style:font-name-complex="Times New Roman" fo:font-size="14pt" style:font-size-asian="14pt" style:font-size-complex="14pt" fo:language="es" fo:country="ES"/>
    </style:style>
    <style:style style:name="P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" style:parent-style-name="Normal" style:family="paragraph">
      <style:paragraph-properties fo:text-align="end" fo:margin-left="1.9666in">
        <style:tab-stops/>
      </style:paragraph-properties>
    </style:style>
    <style:style style:name="T9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paragraph-properties fo:text-align="end"/>
    </style:style>
    <style:style style:name="T14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" style:parent-style-name="Fuentedepárrafopredeter." style:family="text">
      <style:text-properties style:font-name="Times New Roman" style:font-name-complex="Times New Roman" fo:font-weight="bold" style:font-weight-asian="bold" style:font-weight-complex="bold" fo:color="#000000" fo:font-size="9pt" style:font-size-asian="9pt" style:font-size-complex="9pt" fo:background-color="#FFFFFF"/>
    </style:style>
    <style:style style:name="T16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" style:parent-style-name="Normal" style:family="paragraph">
      <style:paragraph-properties fo:text-align="end"/>
    </style:style>
    <style:style style:name="T18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P21" style:parent-style-name="Normal" style:family="paragraph">
      <style:paragraph-properties fo:text-align="justify" fo:line-height="107%"/>
    </style:style>
    <style:style style:name="T22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4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5" style:parent-style-name="Normal" style:family="paragraph">
      <style:paragraph-properties fo:text-align="justify"/>
    </style:style>
    <style:style style:name="T26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29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2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3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34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35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37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38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39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40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Fuentedepárrafopredeter." style:family="text">
      <style:text-properties style:font-name="Times New Roman" style:font-name-complex="Times New Roman" fo:font-style="italic" style:font-style-asian="italic" style:font-style-complex="italic" fo:color="#767171" fo:font-size="14pt" style:font-size-asian="14pt" style:font-size-complex="14pt"/>
    </style:style>
    <style:style style:name="T42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Fuentedepárrafopredeter." style:family="text">
      <style:text-properties style:font-name="Times New Roman" style:font-name-complex="Times New Roman" fo:font-size="14pt" style:font-size-asian="14pt" style:font-size-complex="14pt"/>
    </style:style>
    <style:style style:name="P47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8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9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0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1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2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3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4" style:parent-style-name="Normal" style:family="paragraph">
      <style:paragraph-properties fo:text-align="justify" fo:line-height="107%"/>
    </style:style>
    <style:style style:name="T55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Ciudad,<text:s/>mes<text:s/>de<text:s/>año<text:s/></text:p>
      <text:p text:style-name="P2"/>
      <text:p text:style-name="P3">Señores:</text:p>
      <text:p text:style-name="P4">Juzgado<text:s/>x</text:p>
      <text:p text:style-name="P5"/>
      <text:p text:style-name="P6">Ciudad.</text:p>
      <text:p text:style-name="P7"/>
      <text:p text:style-name="P8"><text:span text:style-name="T9">ASUNTO:</text:span><text:span text:style-name="T10"><text:s/></text:span><text:span text:style-name="T11">Cambio<text:s/></text:span><text:span text:style-name="T12">plaza de prestación de los servicios de utilidad publica</text:span></text:p>
      <text:p text:style-name="P13"><text:span text:style-name="T14">PROCESO:</text:span><text:span text:style-name="T15"><text:s/></text:span><text:span text:style-name="T16">x</text:span></text:p>
      <text:p text:style-name="P17"><text:span text:style-name="T18">CONDENADA:</text:span><text:span text:style-name="T19"><text:s/>x</text:span><text:span text:style-name="T20"><text:s/></text:span></text:p>
      <text:p text:style-name="P21"><text:span text:style-name="T22">x</text:span></text:p>
      <text:p text:style-name="P23">Cordial saludo,</text:p>
      <text:p text:style-name="P24"/>
      <text:p text:style-name="P25"><text:span text:style-name="T26">Nombre</text:span><text:span text:style-name="T27">,<text:s/></text:span><text:span text:style-name="T28">identificada con<text:s/></text:span><text:span text:style-name="T29">C.C</text:span><text:span text:style-name="T30"><text:s/></text:span><text:span text:style-name="T31">número</text:span><text:span text:style-name="T32">,</text:span><text:span text:style-name="T33"><text:s/>en calidad de condenada dentro del proceso del asunto, proceso por el cual me<text:s/></text:span><text:span text:style-name="T34">fue concedido<text:s/></text:span><text:span text:style-name="T35">el sustituto de la ley de utilidad pública ley 2292 de 2023</text:span><text:span text:style-name="T36">, me dirijo a su despacho para solicitar cambio de plaza para la realización de los servicios<text:s/></text:span><text:span text:style-name="T37">en _______</text:span><text:span text:style-name="T38">, dado que, como es de conocimiento de su despacho, tengo importantes dificultades<text:s/></text:span><text:span text:style-name="T39">_______</text:span><text:span text:style-name="T40"><text:s/>que me impiden<text:s/></text:span><text:span text:style-name="T41">describa la situación</text:span><text:span text:style-name="T42"><text:s/>al Instituto Colombiano de Bienestar Familiar, entidad en la cual actualmente tengo asignados mis servicios de<text:s/></text:span><text:span text:style-name="T43">utilidad</text:span><text:span text:style-name="T44"><text:s/></text:span><text:span text:style-name="T45">pública</text:span><text:span text:style-name="T46">.<text:s/></text:span></text:p>
      <text:p text:style-name="P47"/>
      <text:p text:style-name="P48">Por esta razón y teniendo conocimiento de que la Confraternidad Carcelaria de Colombia con la cual existe convenio,<text:s/>cuenta con<text:s/>plazas abiertas cerca a mi lugar de residencia, solicito me autorice el cambio de plaza a esta entidad con el fin de poder seguir con la prestación de mis servicios sin inconveniente.</text:p>
      <text:p text:style-name="P49"/>
      <text:p text:style-name="P50"/>
      <text:p text:style-name="P51">Cordialmente,</text:p>
      <text:p text:style-name="P52"/>
      <text:p text:style-name="P53"/>
      <text:p text:style-name="P54"><text:span text:style-name="T55">x</text:span></text:p>
      <text:p text:style-name="P56">Salvoconducto.<text:s/>x</text:p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rfc-language-tag="es-ES_tradnl" fo:language="es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rfc-language-tag="es-ES_tradnl" fo:language="es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rfc-language-tag="es-ES_tradnl" fo:language="es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gy Cáceres</meta:initial-creator>
    <dc:creator>PRACTICAS UTILIDAD PUBLICA</dc:creator>
    <meta:creation-date>2026-06-07T19:19:00Z</meta:creation-date>
    <dc:date>2026-06-07T19:19:00Z</dc:date>
    <meta:template xlink:href="Normal.dotm" xlink:type="simple"/>
    <meta:editing-cycles>7</meta:editing-cycles>
    <meta:editing-duration>PT0S</meta:editing-duration>
    <meta:user-defined meta:name="ContentTypeId">0x0101001E383EC081EE734A813143B06E2A3664</meta:user-defined>
    <meta:user-defined meta:name="MediaServiceImageTags"/>
    <meta:document-statistic meta:page-count="1" meta:paragraph-count="2" meta:word-count="164" meta:character-count="1064" meta:row-count="7" meta:non-whitespace-character-count="902"/>
  </office:meta>
</office:document-meta>
</file>